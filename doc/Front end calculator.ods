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86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13.859cm"/>
    </style:style>
    <style:style style:name="co5" style:family="table-column">
      <style:table-column-properties fo:break-before="auto" style:column-width="2.988cm"/>
    </style:style>
    <style:style style:name="co6" style:family="table-column">
      <style:table-column-properties fo:break-before="auto" style:column-width="11.322cm"/>
    </style:style>
    <style:style style:name="co7" style:family="table-column">
      <style:table-column-properties fo:break-before="auto" style:column-width="3.009cm"/>
    </style:style>
    <style:style style:name="co8" style:family="table-column">
      <style:table-column-properties fo:break-before="auto" style:column-width="6.752cm"/>
    </style:style>
    <style:style style:name="co9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0000"/>
    </style:style>
    <style:style style:name="ce10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 table:null-year="1950"/>
      <table:table table:name="3 Wi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OPC front end calculator (3Wire calc)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" office:value-type="string" calcext:value-type="string">
            <text:p>Valeur calculée</text:p>
          </table:table-cell>
        </table:table-row>
        <table:table-row table:style-name="ro1">
          <table:table-cell table:number-columns-repeated="5"/>
          <table:table-cell table:style-name="ce5" office:value-type="string" calcext:value-type="string">
            <text:p>Valeur définie</text:p>
          </table:table-cell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Unité</text:p>
          </table:table-cell>
          <table:table-cell table:style-name="ce4" office:value-type="string" calcext:value-type="string">
            <text:p>Commentair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Vcc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ension d’alimentation de l’ADC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Imeasur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urant de mesure RT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Rref</text:p>
          </table:table-cell>
          <table:table-cell table:formula="of:=(([.C7])/2)/(([.C8])*2)" office:value-type="float" office:value="1650" calcext:value-type="float">
            <text:p>1650</text:p>
          </table:table-cell>
          <table:table-cell office:value-type="string" calcext:value-type="string">
            <text:p>ohm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rRTDma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Resistance max de la RTD à mesurer (dépends de la T°C max voulue)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VinMax</text:p>
          </table:table-cell>
          <table:table-cell table:formula="of:=([.C14])*([.C8])"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maxGain</text:p>
          </table:table-cell>
          <table:table-cell table:formula="of:=([.C7]/2)/[.C16]" office:value-type="float" office:value="16.5" calcext:value-type="float">
            <text:p>16,5</text:p>
          </table:table-cell>
          <table:table-cell/>
          <table:table-cell office:value-type="string" calcext:value-type="string">
            <text:p>Arrondir au gain en desso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Gain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rRTDm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Resistance min de la RTD à mesurer (dépends de la T°C min voulue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RleadMa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Resistance totale de la sortie ADC à la sonde (fil + mux!!)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VcmMin</text:p>
          </table:table-cell>
          <table:table-cell table:formula="of:=[.C7]/2+[.C8]*2*[.C23]+[.C8]*[.C23]+0.5*[.C8]*[.C22]" office:value-type="float" office:value="1.6925" calcext:value-type="float">
            <text:p>1,692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VcmMinReq ≥</text:p>
          </table:table-cell>
          <table:table-cell table:formula="of:=[.C7]/4" office:value-type="float" office:value="0.825" calcext:value-type="float">
            <text:p>0,82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VcmMinReq ≥</text:p>
          </table:table-cell>
          <table:table-cell table:formula="of:=0.2+0.5*[.C18]*[.C16]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VcmMax</text:p>
          </table:table-cell>
          <table:table-cell table:formula="of:=([.C10] * 2 * [.C8]) + (2*[.C8]*[.C23])+([.C8]*[.C23])+(0.5*[.C14]*[.C8])" office:value-type="float" office:value="1.73" calcext:value-type="float">
            <text:p>1,73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VcmMaxReq ≤</text:p>
          </table:table-cell>
          <table:table-cell table:formula="of:=[.C7]-0.2-(0.5*[.C18]*[.C16])" office:value-type="float" office:value="2.3" calcext:value-type="float">
            <text:p>2,3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Vain1Max</text:p>
          </table:table-cell>
          <table:table-cell table:formula="of:=([.C8]*2*[.C10])+([.C8]*2*[.C23])+([.C8]*([.C23]+[.C14]))" office:value-type="float" office:value="1.78" calcext:value-type="float">
            <text:p>1,78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in1Max ≤</text:p>
          </table:table-cell>
          <table:table-cell table:formula="of:=[.C7]-0.9" office:value-type="float" office:value="2.4" calcext:value-type="float">
            <text:p>2,4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</table:table>
      <table:table table:name="4 Wir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OPC front end calculator (4 Wire calc)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" office:value-type="string" calcext:value-type="string">
            <text:p>Valeur calculée</text:p>
          </table:table-cell>
        </table:table-row>
        <table:table-row table:style-name="ro1">
          <table:table-cell table:number-columns-repeated="5"/>
          <table:table-cell table:style-name="ce5" office:value-type="string" calcext:value-type="string">
            <text:p>Valeur définie</text:p>
          </table:table-cell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Unité</text:p>
          </table:table-cell>
          <table:table-cell table:style-name="ce4" office:value-type="string" calcext:value-type="string">
            <text:p>Commentair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Vcc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ension d’alimentation de l’ADC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Imeasur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urant de mesure RT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Rref</text:p>
          </table:table-cell>
          <table:table-cell table:formula="of:=(([.C7])/2)/(([.C8]))" office:value-type="float" office:value="1650" calcext:value-type="float">
            <text:p>1650</text:p>
          </table:table-cell>
          <table:table-cell office:value-type="string" calcext:value-type="string">
            <text:p>ohm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rRTDma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Resistance max de la RTD à mesurer (dépends de la T°C max voulue)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VinMax</text:p>
          </table:table-cell>
          <table:table-cell table:formula="of:=([.C14])*([.C8])" office:value-type="float" office:value="0.2" calcext:value-type="float">
            <text:p>0,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maxGain</text:p>
          </table:table-cell>
          <table:table-cell table:formula="of:=([.C7]/2)/[.C16]" office:value-type="float" office:value="8.25" calcext:value-type="float">
            <text:p>8,25</text:p>
          </table:table-cell>
          <table:table-cell/>
          <table:table-cell office:value-type="string" calcext:value-type="string">
            <text:p>Arrondir au gain en desso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Gain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rRTDm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Resistance min de la RTD à mesurer (dépends de la T°C min voulue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RleadMa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Resistance totale de la sortie ADC à la sonde (fil + mux!!)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VcmMin</text:p>
          </table:table-cell>
          <table:table-cell table:formula="of:=[.C7]/2+[.C8]*[.C23]+0.5*[.C8]*[.C22]" office:value-type="float" office:value="1.695" calcext:value-type="float">
            <text:p>1,69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VcmMinReq ≥</text:p>
          </table:table-cell>
          <table:table-cell table:formula="of:=[.C7]/4" office:value-type="float" office:value="0.825" calcext:value-type="float">
            <text:p>0,82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VcmMinReq ≥</text:p>
          </table:table-cell>
          <table:table-cell table:formula="of:=0.2+0.5*[.C18]*[.C16]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VcmMax</text:p>
          </table:table-cell>
          <table:table-cell table:formula="of:=([.C10] * [.C8]) + ([.C8]*[.C23])+(0.5*[.C14]*[.C8])" office:value-type="float" office:value="1.77" calcext:value-type="float">
            <text:p>1,77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VcmMaxReq ≤</text:p>
          </table:table-cell>
          <table:table-cell table:formula="of:=[.C7]-0.2-(0.5*[.C18]*[.C16])" office:value-type="float" office:value="2.3" calcext:value-type="float">
            <text:p>2,3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Vain1Max</text:p>
          </table:table-cell>
          <table:table-cell table:formula="of:=([.C8]*[.C10])+([.C8]*[.C23])+([.C8]*([.C23]+[.C14]))" office:value-type="float" office:value="1.89" calcext:value-type="float">
            <text:p>1,89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in1Max ≤</text:p>
          </table:table-cell>
          <table:table-cell table:formula="of:=[.C7]-0.9" office:value-type="float" office:value="2.4" calcext:value-type="float">
            <text:p>2,4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</table:table>
      <table:table table:name="Filtering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Input filtering for ADC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/>
          <table:table-cell office:value-type="string" calcext:value-type="string">
            <text:p>R4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/>
          <table:table-cell office:value-type="string" calcext:value-type="string">
            <text:p>Rref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/>
          <table:table-cell office:value-type="string" calcext:value-type="string">
            <text:p>Ci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F</text:p>
          </table:table-cell>
        </table:table-row>
        <table:table-row table:style-name="ro1">
          <table:table-cell/>
          <table:table-cell office:value-type="string" calcext:value-type="string">
            <text:p>CinCm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nF</text:p>
          </table:table-cell>
        </table:table-row>
        <table:table-row table:style-name="ro1">
          <table:table-cell/>
          <table:table-cell office:value-type="string" calcext:value-type="string">
            <text:p>Cre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F</text:p>
          </table:table-cell>
        </table:table-row>
        <table:table-row table:style-name="ro1">
          <table:table-cell/>
          <table:table-cell office:value-type="string" calcext:value-type="string">
            <text:p>CrefCM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nF</text:p>
          </table:table-cell>
        </table:table-row>
        <table:table-row table:style-name="ro1">
          <table:table-cell/>
          <table:table-cell office:value-type="string" calcext:value-type="string">
            <text:p>Rrt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fferential-Mode Corner Frequency</text:p>
          </table:table-cell>
          <table:table-cell table:style-name="ce10" table:formula="of:=1/(2 * PI() * [.C12] * 10^-9 * ([.C7]+[.C8]+[.C16]) )" office:value-type="float" office:value="278.019325528238" calcext:value-type="float">
            <text:p>278,02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string" calcext:value-type="string">
            <text:p>Common-Mode Corner Frequency 1</text:p>
          </table:table-cell>
          <table:table-cell table:style-name="ce10" table:formula="of:= 1 / ( 2 * PI() * [.C13] * 10^-9 * ([.C7] + [.C16] + [.C11]) )" office:value-type="float" office:value="4346.95171365076" calcext:value-type="float">
            <text:p>4346,95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string" calcext:value-type="string">
            <text:p>Common-Mode Corner Frequency 2</text:p>
          </table:table-cell>
          <table:table-cell table:style-name="ce10" table:formula="of:= 1 / ( 2 * PI() * [.C13] * 10^-9 * ([.C8]+ [.C11]) )" office:value-type="float" office:value="4403.47904412736" calcext:value-type="float">
            <text:p>4403,48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2"/>
          <table:table-cell table:style-name="ce10"/>
          <table:table-cell/>
        </table:table-row>
        <table:table-row table:style-name="ro1">
          <table:table-cell/>
          <table:table-cell office:value-type="string" calcext:value-type="string">
            <text:p>Reference path</text:p>
          </table:table-cell>
          <table:table-cell table:style-name="ce10"/>
          <table:table-cell/>
        </table:table-row>
        <table:table-row table:style-name="ro1">
          <table:table-cell/>
          <table:table-cell office:value-type="string" calcext:value-type="string">
            <text:p>Differential-Mode Corner Frequency</text:p>
          </table:table-cell>
          <table:table-cell table:style-name="ce10" table:formula="of:=1/( 2 * PI() * [.C14] * 10^-9 * ([.C9]+[.C11]+[.C10]))" office:value-type="float" office:value="279.626373652679" calcext:value-type="float">
            <text:p>279,63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string" calcext:value-type="string">
            <text:p>Common-Mode Corner Frequency 1</text:p>
          </table:table-cell>
          <table:table-cell table:style-name="ce10" table:formula="of:=1/ ( 2 * PI() * [.C15] * 10^-9*([.C9]+[.C11]))" office:value-type="float" office:value="4921.91189670631" calcext:value-type="float">
            <text:p>4921,91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string" calcext:value-type="string">
            <text:p>Common-Mode Corner Frequency 2</text:p>
          </table:table-cell>
          <table:table-cell table:style-name="ce10" table:formula="of:=1/ ( 2 * PI() * [.C15] * 10^-9*([.C10]))" office:value-type="float" office:value="6474.713929128" calcext:value-type="float">
            <text:p>6474,71</text:p>
          </table:table-cell>
          <table:table-cell office:value-type="string" calcext:value-type="string">
            <text:p>Hz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Objectif → avoir la même fréq de coupure sur les deux filtres différentiels (car c’est les plus dominants sur la mesur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Utiliser des capa C0G / NP0 pour des meilleurs résultat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Utiliser des résistances 1 % pour des meilleurs résultat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Rref n’as pas besoin de précision mais un super low ppm/°K pour la stabilité de la mesure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5">00/00/0000</text:date>, <text:time style:data-style-name="N2" text:time-value="09:56:08.3740429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5T08:33:57.067555445</meta:creation-date>
    <dc:date>2026-07-15T10:52:35.797926456</dc:date>
    <meta:editing-duration>PT1H53M29S</meta:editing-duration>
    <meta:editing-cycles>38</meta:editing-cycles>
    <meta:generator>LibreOffice/26.2.4.2$Linux_X86_64 LibreOffice_project/620$Build-2</meta:generator>
    <meta:document-statistic meta:table-count="3" meta:cell-count="176" meta:object-count="0"/>
  </office:meta>
</office:document-meta>
</file>